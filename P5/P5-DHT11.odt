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3000003CDCBCABA29.png" manifest:media-type="image/png"/>
  <manifest:file-entry manifest:full-path="Pictures/1000000000000640000004B4965AEE66.jpg" manifest:media-type="image/jpeg"/>
  <manifest:file-entry manifest:full-path="Pictures/1000000000000238000000E161E89E7D.png" manifest:media-type="image/png"/>
  <manifest:file-entry manifest:full-path="Pictures/10000000000004000000024C6A7798AC.png" manifest:media-type="image/png"/>
  <manifest:file-entry manifest:full-path="Pictures/10000000000001900000019068EC48D7.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Text_20_body">
      <style:paragraph-properties fo:text-align="start" style:justify-single-word="false"/>
      <style:text-properties officeooo:paragraph-rsid="001b605a"/>
    </style:style>
    <style:style style:name="P4" style:family="paragraph" style:parent-style-name="Text_20_body">
      <style:paragraph-properties fo:margin-top="0cm" fo:margin-bottom="0.046cm" style:contextual-spacing="false" fo:text-align="start" style:justify-single-word="false"/>
      <style:text-properties officeooo:paragraph-rsid="001b605a"/>
    </style:style>
    <style:style style:name="P5"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6"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7"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8" style:family="paragraph" style:parent-style-name="normal">
      <style:paragraph-properties fo:margin-top="0.494cm" fo:margin-bottom="0.494cm" style:contextual-spacing="false" fo:line-height="100%" fo:text-align="start" style:justify-single-word="false"/>
      <style:text-properties officeooo:paragraph-rsid="00179683"/>
    </style:style>
    <style:style style:name="P9" style:family="paragraph" style:parent-style-name="normal">
      <style:paragraph-properties fo:margin-top="0.192cm" fo:margin-bottom="0.192cm" style:contextual-spacing="false" fo:line-height="100%" fo:text-align="start" style:justify-single-word="false"/>
      <style:text-properties officeooo:paragraph-rsid="0013bbfd"/>
    </style:style>
    <style:style style:name="P10" style:family="paragraph" style:parent-style-name="normal">
      <style:paragraph-properties fo:margin-top="0.192cm" fo:margin-bottom="0.192cm" style:contextual-spacing="false" fo:line-height="100%" fo:text-align="start" style:justify-single-word="false"/>
      <style:text-properties officeooo:paragraph-rsid="001b605a"/>
    </style:style>
    <style:style style:name="P11" style:family="paragraph" style:parent-style-name="normal">
      <style:paragraph-properties fo:margin-top="0.494cm" fo:margin-bottom="0.494cm" style:contextual-spacing="false" fo:line-height="100%" fo:text-align="start" style:justify-single-word="false"/>
      <style:text-properties officeooo:paragraph-rsid="001b605a"/>
    </style:style>
    <style:style style:name="P12"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3"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14"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55986" style:font-name-asian="Arial2" style:font-size-asian="22pt" style:font-weight-asian="normal" style:font-name-complex="Arial2" style:font-size-complex="22pt" style:font-weight-complex="normal"/>
    </style:style>
    <style:style style:name="P15"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6"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d5db1" style:font-name-asian="Arial2" style:font-size-asian="22pt" style:font-weight-asian="normal" style:font-name-complex="Arial2" style:font-size-complex="22pt" style:font-weight-complex="normal"/>
    </style:style>
    <style:style style:name="P17"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8"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d5db1" style:font-name-asian="Arial2" style:font-size-asian="22pt" style:font-weight-asian="normal" style:font-name-complex="Arial2" style:font-size-complex="22pt" style:font-weight-complex="normal"/>
    </style:style>
    <style:style style:name="P19" style:family="paragraph" style:parent-style-name="normal">
      <style:paragraph-properties fo:margin-top="0.494cm" fo:margin-bottom="0.494cm" style:contextual-spacing="false" fo:line-height="100%" fo:text-align="start" style:justify-single-word="false"/>
      <style:text-properties fo:font-weight="normal" officeooo:paragraph-rsid="00179683" style:font-weight-asian="normal" style:font-weight-complex="normal"/>
    </style:style>
    <style:style style:name="P20" style:family="paragraph" style:parent-style-name="normal">
      <style:paragraph-properties fo:margin-top="0.494cm" fo:margin-bottom="0.494cm" style:contextual-spacing="false" fo:line-height="100%" fo:text-align="start" style:justify-single-word="false"/>
      <style:text-properties fo:font-weight="normal" officeooo:paragraph-rsid="001b605a" style:font-weight-asian="normal" style:font-weight-complex="normal"/>
    </style:style>
    <style:style style:name="P21" style:family="paragraph" style:parent-style-name="normal">
      <style:paragraph-properties fo:margin-top="0.494cm" fo:margin-bottom="0.494cm" style:contextual-spacing="false" fo:line-height="100%" fo:text-align="start" style:justify-single-word="false"/>
      <style:text-properties style:font-name="Liberation Serif" officeooo:paragraph-rsid="0013bbfd"/>
    </style:style>
    <style:style style:name="P22" style:family="paragraph" style:parent-style-name="normal">
      <style:paragraph-properties fo:margin-top="0.192cm" fo:margin-bottom="0.1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179683" style:font-name-asian="Arial2" style:font-size-asian="22pt" style:font-weight-asian="bold" style:font-name-complex="Arial2" style:font-size-complex="22pt"/>
    </style:style>
    <style:style style:name="T7" style:family="text">
      <style:text-properties style:font-name="Arial" fo:font-size="22pt" fo:font-weight="bold" officeooo:rsid="001b605a" style:font-name-asian="Arial2" style:font-size-asian="22pt" style:font-weight-asian="bold" style:font-name-complex="Arial2" style:font-size-complex="22pt"/>
    </style:style>
    <style:style style:name="T8" style:family="text">
      <style:text-properties style:font-name="Arial" fo:font-size="22pt" style:font-name-asian="Arial2" style:font-size-asian="22pt" style:font-name-complex="Arial2" style:font-size-complex="22pt"/>
    </style:style>
    <style:style style:name="T9" style:family="text">
      <style:text-properties style:font-name="Arial" fo:font-size="22pt" officeooo:rsid="00125de4" style:font-name-asian="Arial2" style:font-size-asian="22pt" style:font-name-complex="Arial2" style:font-size-complex="22pt"/>
    </style:style>
    <style:style style:name="T10" style:family="text">
      <style:text-properties style:font-name="Arial" fo:font-size="22pt" officeooo:rsid="001260f3" style:font-name-asian="Arial2" style:font-size-asian="22pt" style:font-name-complex="Arial2" style:font-size-complex="22pt"/>
    </style:style>
    <style:style style:name="T11"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2" style:family="text">
      <style:text-properties style:font-name="Arial" fo:font-size="15pt" officeooo:rsid="001260f3" style:font-name-asian="Arial2" style:font-size-asian="15pt" style:font-name-complex="Arial2" style:font-size-complex="15pt"/>
    </style:style>
    <style:style style:name="T13" style:family="text">
      <style:text-properties style:font-name="Arial" fo:font-size="15pt" officeooo:rsid="001937df" style:font-name-asian="Arial2" style:font-size-asian="15pt" style:font-name-complex="Arial2" style:font-size-complex="15pt"/>
    </style:style>
    <style:style style:name="T14"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5"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6"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17" style:family="text">
      <style:text-properties style:font-name="Arial" fo:font-size="15pt" fo:font-weight="bold" officeooo:rsid="001260f3" style:font-name-asian="Arial2" style:font-size-asian="15pt" style:font-weight-asian="bold" style:font-name-complex="Arial2" style:font-size-complex="15pt" style:font-weight-complex="bold"/>
    </style:style>
    <style:style style:name="T18" style:family="text">
      <style:text-properties style:font-name="Arial" fo:font-size="15pt" fo:font-weight="bold" officeooo:rsid="001d5db1" style:font-name-asian="Arial2" style:font-size-asian="15pt" style:font-weight-asian="bold" style:font-name-complex="Arial2" style:font-size-complex="15pt" style:font-weight-complex="bold"/>
    </style:style>
    <style:style style:name="T19"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0" style:family="text">
      <style:text-properties style:font-name="Arial" fo:font-size="14pt" officeooo:rsid="001260f3" style:font-name-asian="Arial2" style:font-size-asian="14pt" style:font-name-complex="Arial2" style:font-size-complex="14pt"/>
    </style:style>
    <style:style style:name="T21"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2"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3" style:family="text">
      <style:text-properties fo:font-size="15pt" style:font-size-asian="15pt" style:font-size-complex="15pt"/>
    </style:style>
    <style:style style:name="T24" style:family="text">
      <style:text-properties fo:font-size="15pt" officeooo:rsid="0013bbfd" style:font-size-asian="15pt" style:font-size-complex="15pt"/>
    </style:style>
    <style:style style:name="T25" style:family="text">
      <style:text-properties fo:font-size="15pt" officeooo:rsid="00160399" style:font-size-asian="15pt" style:font-size-complex="15pt"/>
    </style:style>
    <style:style style:name="T26" style:family="text">
      <style:text-properties fo:font-size="15pt" officeooo:rsid="001a6411" style:font-size-asian="15pt" style:font-size-complex="15pt"/>
    </style:style>
    <style:style style:name="T27" style:family="text">
      <style:text-properties fo:font-size="15pt" fo:font-weight="bold" style:font-size-asian="15pt" style:font-weight-asian="bold" style:font-size-complex="15pt" style:font-weight-complex="bold"/>
    </style:style>
    <style:style style:name="T28" style:family="text">
      <style:text-properties fo:font-size="15pt" fo:font-weight="bold" officeooo:rsid="0013bbfd" style:font-size-asian="15pt" style:font-weight-asian="bold" style:font-size-complex="15pt" style:font-weight-complex="bold"/>
    </style:style>
    <style:style style:name="T29" style:family="text">
      <style:text-properties fo:font-size="15pt" fo:font-weight="bold" officeooo:rsid="001d5db1" style:font-size-asian="15pt" style:font-weight-asian="bold" style:font-size-complex="15pt" style:font-weight-complex="bold"/>
    </style:style>
    <style:style style:name="T30" style:family="text">
      <style:text-properties fo:font-size="15pt" fo:font-style="italic" fo:font-weight="bold" officeooo:rsid="00160399" style:font-size-asian="15pt" style:font-style-asian="italic" style:font-weight-asian="bold" style:font-size-complex="15pt" style:font-style-complex="italic" style:font-weight-complex="bold"/>
    </style:style>
    <style:style style:name="T31"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2" style:family="text">
      <style:text-properties fo:font-size="15pt" fo:font-style="italic" fo:font-weight="bold" officeooo:rsid="001b605a" style:font-name-asian="Arial2" style:font-size-asian="15pt" style:font-style-asian="italic" style:font-weight-asian="bold" style:font-name-complex="Arial2" style:font-size-complex="15pt" style:font-style-complex="italic" style:font-weight-complex="bold"/>
    </style:style>
    <style:style style:name="T33" style:family="text">
      <style:text-properties fo:font-weight="bold" officeooo:rsid="0013bbfd" style:font-weight-asian="bold"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Arial1" fo:font-size="15pt" style:font-size-asian="15pt" style:font-size-complex="15pt"/>
    </style:style>
    <style:style style:name="T36" style:family="text">
      <style:text-properties style:font-name="Arial1" fo:font-size="15pt" officeooo:rsid="001260f3" style:font-name-asian="Arial2" style:font-size-asian="15pt" style:font-name-complex="Arial2" style:font-size-complex="15pt"/>
    </style:style>
    <style:style style:name="T37"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38" style:family="text">
      <style:text-properties style:font-name="Liberation Serif" fo:font-size="12pt" fo:font-style="italic" fo:font-weight="normal" officeooo:rsid="001260f3" style:font-name-asian="Arial2" style:font-size-asian="12pt" style:font-style-asian="italic" style:font-weight-asian="normal" style:font-name-complex="Arial2" style:font-size-complex="12pt" style:font-style-complex="italic" style:font-weight-complex="normal"/>
    </style:style>
    <style:style style:name="T39"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0"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41" style:family="text">
      <style:text-properties style:font-name="Liberation Serif" fo:font-size="15pt" fo:font-style="italic" fo:font-weight="bold" officeooo:rsid="001b605a" style:font-name-asian="Arial2" style:font-size-asian="15pt" style:font-style-asian="italic" style:font-weight-asian="bold" style:font-name-complex="Arial2" style:font-size-complex="15pt" style:font-style-complex="italic" style:font-weight-complex="bold"/>
    </style:style>
    <style:style style:name="T42" style:family="text">
      <style:text-properties style:font-name="Liberation Serif" fo:font-style="italic" officeooo:rsid="001260f3" style:font-name-asian="Arial2" style:font-style-asian="italic" style:font-name-complex="Arial2"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draw:frame draw:style-name="fr3" draw:name="image10.png" text:anchor-type="char" svg:x="-0.485cm" svg:y="0.203cm" svg:width="4.939cm" svg:height="1.446cm" draw:z-index="1"><draw:image xlink:href="Pictures/100000000000012C0000005AEAF22963.png" xlink:type="simple" xlink:show="embed" xlink:actuate="onLoad" draw:mime-type="image/png"/></draw:frame><draw:frame draw:style-name="fr3"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5" loext:marker-style-name="T1"><text:span text:style-name="T1"/></text:p>
      <text:p text:style-name="P5" loext:marker-style-name="T1"><text:span text:style-name="T1">Practica </text:span><text:span text:style-name="T7">5</text:span><text:span text:style-name="T2"> </text:span><text:span text:style-name="T7">DHT11Sensor</text:span></text:p>
      <text:p text:style-name="P5" loext:marker-style-name="T8"><text:span text:style-name="T1"/></text:p>
      <text:p text:style-name="P5" loext:marker-style-name="T8"><text:span text:style-name="T1">Nombre del docente:</text:span><text:span text:style-name="T8"><text:line-break/></text:span><text:span text:style-name="T9">Gustavo Moises Romero Gonzalez</text:span></text:p>
      <text:p text:style-name="P5" loext:marker-style-name="T1"><text:span text:style-name="T2">Materia:</text:span></text:p>
      <text:p text:style-name="P5" loext:marker-style-name="T1"><text:span text:style-name="T11">Sistemas Embebidos Aplicados a Móviles</text:span><text:span text:style-name="T1"><text:line-break/></text:span></text:p>
      <text:p text:style-name="P5" loext:marker-style-name="T8"><text:span text:style-name="T1">Nombre del alumno(a):</text:span></text:p>
      <text:p text:style-name="P5" loext:marker-style-name="T8"><text:span text:style-name="T8"><text:line-break/>Cabañas Santamaria Anel Athziri<text:line-break/>Miranda Martinez Alejandro<text:line-break/>Roldan Velazquez Ian Jurguen</text:span></text:p>
      <text:p text:style-name="P12" loext:marker-style-name="T8"/>
      <text:p text:style-name="P7" loext:marker-style-name="T8"><text:soft-page-break/><text:span text:style-name="T4">Objetivo</text:span></text:p>
      <text:p text:style-name="P7" loext:marker-style-name="T8"><text:span text:style-name="T36">Configurar un sistema embebido basado en Raspberry Pi para la lectura de datos ambientales de temperatura y humedad mediante el sensor digital DHT11, utilizando Python bajo un enfoque de programación modular, manejo de excepciones y control eficiente de recursos de hardware.</text:span><text:span text:style-name="T12"><text:line-break/></text:span><text:span text:style-name="T10"><text:line-break/><text:line-break/></text:span><text:span text:style-name="T3">Librerías Descargadas e Instalación</text:span></text:p>
      <text:p text:style-name="P8" loext:marker-style-name="T8"><text:span text:style-name="T22">Para realizar la interfaz de lectura digital del sensor a través de los pines de la Raspberry Pi, se preparó el entorno instalando las librerías nativas y el framework CircuitPython de Adafruit:</text:span></text:p>
      <text:p text:style-name="P8" loext:marker-style-name="T8"><text:span text:style-name="T21">libgpiod2</text:span><text:span text:style-name="T22">: Dependencia del sistema operativo necesaria para el mapeo e interacción a bajo nivel con las líneas GPIO en kernels Linux modernos.</text:span></text:p>
      <text:p text:style-name="P8" loext:marker-style-name="T8"><text:span text:style-name="T21">adafruit-circuitpython-dht</text:span><text:span text:style-name="T22">: Biblioteca especializada de Adafruit que abstrae la sincronización de tiempos del protocolo de un solo hilo (1-Wire) del DHT11 para entregar lecturas directas en variables de Python.</text:span></text:p>
      <text:p text:style-name="P11" loext:marker-style-name="T8"><text:span text:style-name="T4">Pasos de configuración</text:span><text:span text:style-name="T10"><text:line-break/><text:line-break/></text:span><text:span text:style-name="T22"># 1. Actualización e indexación de repositorios del sistema:</text:span></text:p>
      <text:p text:style-name="P11" loext:marker-style-name="T8"><text:span text:style-name="T21">sudo apt update &amp;&amp; sudo apt upgrade -y</text:span></text:p>
      <text:p text:style-name="P20" loext:marker-style-name="T8"><text:span text:style-name="T20"># 2. Instalación de gestores y dependencias GPIO:</text:span></text:p>
      <text:p text:style-name="P11" loext:marker-style-name="T8"><text:span text:style-name="T21">sudo apt install -y python3-pip python3-dev libgpiod2</text:span></text:p>
      <text:p text:style-name="P20" loext:marker-style-name="T8"><text:soft-page-break/><text:span text:style-name="T20"># 3. Instalación del ecosistema CircuitPython para el sensor DHT:</text:span></text:p>
      <text:p text:style-name="P11" loext:marker-style-name="T8"><text:span text:style-name="T21">pip3 install adafruit-circuitpython-dht</text:span></text:p>
      <text:p text:style-name="P11" loext:marker-style-name="T8"><text:span text:style-name="T21">pip3 install --upgrade setuptools</text:span><text:span text:style-name="T10"><text:line-break/><text:line-break/>Desarrollo de la Practica</text:span></text:p>
      <text:p text:style-name="P13" loext:marker-style-name="T8">1. Creación de carpeta y archivo.</text:p>
      <text:p text:style-name="P6" loext:marker-style-name="T8"><text:span text:style-name="T13">Se creo una carpeta llamada </text:span><text:span text:style-name="T16">P</text:span><text:span text:style-name="T18">5</text:span><text:span text:style-name="T16">_dht11_lab </text:span><text:span text:style-name="T19">para poder identificarla y meter el código dentro.</text:span><text:span text:style-name="T12"><text:line-break/><text:line-break/><text:line-break/></text:span><text:span text:style-name="T14">Adjunto Programa </text:span><text:span text:style-name="T15">y nombre de archivo</text:span><text:span text:style-name="T14">:</text:span></text:p>
      <text:p text:style-name="P21" loext:marker-style-name="T8"><text:span text:style-name="T31">d</text:span><text:span text:style-name="T32">ht</text:span><text:span text:style-name="T31">_</text:span><text:span text:style-name="T32">reader</text:span><text:span text:style-name="T31">.py</text:span></text:p>
      <text:p text:style-name="P9" loext:marker-style-name="T8"><text:span text:style-name="T34">from sensor_utils import DHT11Sensor</text:span></text:p>
      <text:p text:style-name="P9" loext:marker-style-name="T8"><text:span text:style-name="T34">import time</text:span></text:p>
      <text:p text:style-name="P9" loext:marker-style-name="T8"><text:span text:style-name="T34"/></text:p>
      <text:p text:style-name="P9" loext:marker-style-name="T8"><text:span text:style-name="T34">def read_sensor_continuous(interval=2, iterations=10):</text:span></text:p>
      <text:p text:style-name="P9" loext:marker-style-name="T8"><text:span text:style-name="T34"><text:s text:c="4"/>sensor = DHT11Sensor()</text:span></text:p>
      <text:p text:style-name="P9" loext:marker-style-name="T8"><text:span text:style-name="T34"><text:s text:c="4"/>try:</text:span></text:p>
      <text:p text:style-name="P9" loext:marker-style-name="T8"><text:span text:style-name="T34"><text:s text:c="8"/>for i in range(iterations):</text:span></text:p>
      <text:p text:style-name="P9" loext:marker-style-name="T8"><text:span text:style-name="T34"><text:s text:c="12"/>temperature, humidity = sensor.read()</text:span></text:p>
      <text:p text:style-name="P9" loext:marker-style-name="T8"><text:span text:style-name="T34"><text:s text:c="12"/>if temperature is not None:</text:span></text:p>
      <text:p text:style-name="P9" loext:marker-style-name="T8"><text:span text:style-name="T34"><text:tab/> <text:s text:c="15"/>print(f"[{i+1}] Temp: {temperature:.1f}°C Hum: {humidity:.1f}%")</text:span></text:p>
      <text:p text:style-name="P9" loext:marker-style-name="T8"><text:span text:style-name="T34"><text:s text:c="12"/>else:</text:span></text:p>
      <text:p text:style-name="P9" loext:marker-style-name="T8"><text:span text:style-name="T34"><text:s text:c="16"/>print(f"[{i+1}] Error al leer el sensor (reintentando...).")</text:span></text:p>
      <text:p text:style-name="P9" loext:marker-style-name="T8"><text:soft-page-break/><text:span text:style-name="T34"><text:s text:c="12"/>time.sleep(interval)</text:span></text:p>
      <text:p text:style-name="P9" loext:marker-style-name="T8"><text:span text:style-name="T34"><text:s text:c="4"/>finally:</text:span></text:p>
      <text:p text:style-name="P10" loext:marker-style-name="T8"><text:span text:style-name="T34"><text:s text:c="8"/>sensor.close()</text:span></text:p>
      <text:p text:style-name="P10" loext:marker-style-name="T8"><text:span text:style-name="T34"><text:line-break/></text:span><text:span text:style-name="T40">main</text:span><text:span text:style-name="T39">.py</text:span></text:p>
      <text:p text:style-name="P22" loext:marker-style-name="T8"><text:span text:style-name="T42">from dht_reader import read_sensor_continuous</text:span></text:p>
      <text:p text:style-name="P22" loext:marker-style-name="T8"><text:span text:style-name="T42"/></text:p>
      <text:p text:style-name="P22" loext:marker-style-name="T8"><text:span text:style-name="T42">if __name__ == "__main__":</text:span></text:p>
      <text:p text:style-name="P22" loext:marker-style-name="T8"><text:span text:style-name="T42"><text:s text:c="4"/>print("Iniciando lectura del DHT11...\n")</text:span></text:p>
      <text:p text:style-name="P22" loext:marker-style-name="T8"><text:span text:style-name="T42"><text:s text:c="4"/>read_sensor_continuous()</text:span></text:p>
      <text:p text:style-name="P2"><text:span text:style-name="T38"/></text:p>
      <text:p text:style-name="P3"><text:span text:style-name="T41">sensor_utils</text:span><text:span text:style-name="T39">.py</text:span></text:p>
      <text:p text:style-name="P4"><text:span text:style-name="T38">import adafruit_dht</text:span></text:p>
      <text:p text:style-name="P4"><text:span text:style-name="T38">import board</text:span></text:p>
      <text:p text:style-name="P4"><text:span text:style-name="T38">import time</text:span></text:p>
      <text:p text:style-name="P4"><text:span text:style-name="T38"/></text:p>
      <text:p text:style-name="P4"><text:span text:style-name="T38">class DHT11Sensor:</text:span></text:p>
      <text:p text:style-name="P4"><text:span text:style-name="T38"><text:s text:c="4"/>def __init__(self, pin=board.D23):</text:span></text:p>
      <text:p text:style-name="P4"><text:span text:style-name="T38"><text:s text:c="8"/>self.sensor = adafruit_dht.DHT11(pin)</text:span></text:p>
      <text:p text:style-name="P4"><text:span text:style-name="T38"/></text:p>
      <text:p text:style-name="P4"><text:span text:style-name="T38"><text:s text:c="4"/>def read(self):</text:span></text:p>
      <text:p text:style-name="P4"><text:span text:style-name="T38"><text:s text:c="8"/>try:</text:span></text:p>
      <text:p text:style-name="P4"><text:span text:style-name="T38"><text:s text:c="12"/>temperature = self.sensor.temperature</text:span></text:p>
      <text:p text:style-name="P4"><text:span text:style-name="T38"><text:s text:c="12"/>humidity = self.sensor.humidity</text:span></text:p>
      <text:p text:style-name="P4"><text:span text:style-name="T38"><text:s text:c="12"/>if temperature is None or humidity is None:</text:span></text:p>
      <text:p text:style-name="P4"><text:span text:style-name="T38"><text:s text:c="16"/>raise ValueError("Valores nulos recibidos")</text:span></text:p>
      <text:p text:style-name="P4"><text:span text:style-name="T38"><text:s text:c="12"/>return temperature, humidity</text:span></text:p>
      <text:p text:style-name="P4"><text:span text:style-name="T38"><text:s text:c="8"/>except RuntimeError as e:</text:span></text:p>
      <text:p text:style-name="P4"><text:span text:style-name="T38"><text:s text:c="12"/>return None, None</text:span></text:p>
      <text:p text:style-name="P4"><text:span text:style-name="T38"/></text:p>
      <text:p text:style-name="P4"><text:span text:style-name="T38"><text:s text:c="4"/>def close(self):</text:span></text:p>
      <text:p text:style-name="P4"><text:span text:style-name="T38"><text:s text:c="8"/>self.sensor.exit()</text:span><text:span text:style-name="T12"><text:line-break/></text:span></text:p>
      <text:p text:style-name="P1"><text:span text:style-name="T17"/></text:p>
      <text:p text:style-name="P1"><text:soft-page-break/><text:span text:style-name="T17"/></text:p>
      <text:p text:style-name="P1"><text:span text:style-name="T3">2. </text:span><text:span text:style-name="T5">Conexión</text:span></text:p>
      <text:p text:style-name="P18" loext:marker-style-name="T8"><text:span text:style-name="T23"><text:line-break/></text:span><text:span text:style-name="T27">DHT11 Vista Frontal <text:s text:c="17"/><text:tab/> <text:s text:c="2"/>Raspberry Pi GPIO (Pinout)</text:span></text:p>
      <text:p text:style-name="P18" loext:marker-style-name="T8"><text:span text:style-name="T28"/></text:p>
      <text:p text:style-name="P18" loext:marker-style-name="T8"><text:span text:style-name="T28"><text:s text:c="7"/>(1) VCC <text:s text:c="6"/>◄─────────────────► <text:s/>Pin 2 <text:s/>(5V) <text:s text:c="14"/></text:span></text:p>
      <text:p text:style-name="P18" loext:marker-style-name="T8"><text:span text:style-name="T28"><text:s text:c="7"/>(2) DATA <text:s text:c="5"/>◄─────────────► <text:s/>Pin 16 (GPIO 23) <text:s text:c="7"/></text:span></text:p>
      <text:p text:style-name="P18" loext:marker-style-name="T8"><text:span text:style-name="T28"><text:s text:c="7"/>(</text:span><text:span text:style-name="T29">3</text:span><text:span text:style-name="T28">) GND <text:s text:c="6"/>◄─────────────────► <text:s/>Pin 6 <text:s/>(GND) <text:s text:c="13"/></text:span><text:span text:style-name="T24"><text:s text:c="4"/><text:line-break/></text:span><draw:frame draw:style-name="fr2" draw:name="Imagen7" text:anchor-type="char" svg:x="-0.413cm" svg:y="1.427cm" svg:width="16.588cm" svg:height="9.525cm" draw:z-index="2"><draw:image xlink:href="Pictures/10000000000004000000024C6A7798AC.png" xlink:type="simple" xlink:show="embed" xlink:actuate="onLoad" draw:mime-type="image/png"/></draw:frame><draw:frame draw:style-name="fr2" draw:name="Imagen1" text:anchor-type="char" svg:x="4.08cm" svg:y="10.527cm" svg:width="7.895cm" svg:height="5.383cm" draw:z-index="3"><draw:image xlink:href="Pictures/1000000100000593000003CDCBCABA29.png" xlink:type="simple" xlink:show="embed" xlink:actuate="onLoad" draw:mime-type="image/png"/></draw:frame><text:span text:style-name="T24"><text:line-break/></text:span></text:p>
      <text:p text:style-name="P15" loext:marker-style-name="T8"><text:span text:style-name="T24"><text:line-break/></text:span><text:soft-page-break/><text:span text:style-name="T24"><text:line-break/></text:span><text:span text:style-name="T33">3. Ejecución de programa y implementarlo.</text:span></text:p>
      <text:p text:style-name="P16" loext:marker-style-name="T8"><draw:frame draw:style-name="fr2" draw:name="Imagen2" text:anchor-type="char" svg:x="1.095cm" svg:y="9.948cm" svg:width="15.028cm" svg:height="5.953cm" draw:z-index="4"><draw:image xlink:href="Pictures/1000000000000238000000E161E89E7D.png" xlink:type="simple" xlink:show="embed" xlink:actuate="onLoad" draw:mime-type="image/png"/></draw:frame><draw:frame draw:style-name="fr1" draw:name="Imagen3" text:anchor-type="char" svg:width="12.196cm" svg:height="9.176cm" draw:z-index="5"><draw:image xlink:href="Pictures/1000000000000640000004B4965AEE66.jpg" xlink:type="simple" xlink:show="embed" xlink:actuate="onLoad" draw:mime-type="image/jpeg"/></draw:frame><text:span text:style-name="T25"><text:line-break/> <text:line-break/></text:span><text:span text:style-name="T26"><text:line-break/></text:span><text:span text:style-name="T25"><text:line-break/><text:line-break/><text:line-break/></text:span></text:p>
      <text:p text:style-name="P16" loext:marker-style-name="T8"><text:span text:style-name="T30"/></text:p>
      <text:p text:style-name="P16" loext:marker-style-name="T8"><text:span text:style-name="T30"/></text:p>
      <text:p text:style-name="P16" loext:marker-style-name="T8"><text:span text:style-name="T30"/></text:p>
      <text:p text:style-name="P16" loext:marker-style-name="T8"><text:span text:style-name="T30"/></text:p>
      <text:p text:style-name="P16" loext:marker-style-name="T8"><text:span text:style-name="T30"/></text:p>
      <text:p text:style-name="P16" loext:marker-style-name="T8"><text:span text:style-name="T30"/></text:p>
      <text:p text:style-name="P16" loext:marker-style-name="T8"><text:soft-page-break/><text:span text:style-name="T37">Conclusión:</text:span><text:span text:style-name="T25"><text:line-break/><text:line-break/>La realización de esta práctica permitió comprender los retos asociados a la lectura de sensores digitales con protocolos de sincronización crítica en sistemas operativos multitarea como Linux (Raspberry Pi OS). Al analizar los resultados, se observó que el sensor DHT11 genera errores de lectura ocasionales (RuntimeError), lo que evidenció la necesidad crítica de implementar un manejo robusto de excepciones en el código.</text:span></text:p>
      <text:p text:style-name="P16" loext:marker-style-name="T8"><text:span text:style-name="T25">Finalmente, mediante la encapsulación en la clase DHT11Sensor en el pin GPIO 23, se demostró cómo la programación modular permite aislar estos errores de hardware, asegurando la estabilidad global del programa y facilitando la reutilización del módulo en sistemas de monitoreo ambiental o domótica de mayor escal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3T13:22:07.007459622</dc:date>
    <meta:editing-duration>PT19M55S</meta:editing-duration>
    <meta:editing-cycles>3</meta:editing-cycles>
    <meta:generator>LibreOffice/24.2.7.2$Linux_X86_64 LibreOffice_project/420$Build-2</meta:generator>
    <meta:document-statistic meta:table-count="0" meta:image-count="6" meta:object-count="0" meta:page-count="7" meta:paragraph-count="67" meta:word-count="491" meta:character-count="3938" meta:non-whitespace-character-count="3149"/>
  </office:meta>
</office:document-meta>
</file>