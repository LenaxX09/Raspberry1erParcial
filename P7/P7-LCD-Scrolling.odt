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4A51E6C12.png" manifest:media-type="image/png"/>
  <manifest:file-entry manifest:full-path="Pictures/100000000000024E00000020BD3B423F.png" manifest:media-type="image/png"/>
  <manifest:file-entry manifest:full-path="Pictures/100000000000023E000000492DC051A5.png" manifest:media-type="image/png"/>
  <manifest:file-entry manifest:full-path="Pictures/10000000000004000000024C6A7798AC.png" manifest:media-type="image/png"/>
  <manifest:file-entry manifest:full-path="Pictures/1000000100000601000003E037830C49.png" manifest:media-type="image/png"/>
  <manifest:file-entry manifest:full-path="Pictures/10000000000001900000019068EC48D7.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Text_20_body">
      <style:paragraph-properties fo:text-align="center" style:justify-single-word="false"/>
      <style:text-properties officeooo:paragraph-rsid="001937df"/>
    </style:style>
    <style:style style:name="P4"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5"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6"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7"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8" style:family="paragraph" style:parent-style-name="normal">
      <style:paragraph-properties fo:margin-top="0.192cm" fo:margin-bottom="0.192cm" style:contextual-spacing="false" fo:line-height="100%" fo:text-align="start" style:justify-single-word="false"/>
      <style:text-properties officeooo:paragraph-rsid="0013bbfd"/>
    </style:style>
    <style:style style:name="P9"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0" style:family="paragraph" style:parent-style-name="normal">
      <style:paragraph-properties fo:margin-top="0.494cm" fo:margin-bottom="0.494cm" style:contextual-spacing="false" fo:line-height="100%" fo:text-align="start" style:justify-single-word="false"/>
      <style:text-properties officeooo:paragraph-rsid="00216720"/>
    </style:style>
    <style:style style:name="P11"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2"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1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4"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fc62a" style:font-name-asian="Arial2" style:font-size-asian="22pt" style:font-weight-asian="normal" style:font-name-complex="Arial2" style:font-size-complex="22pt" style:font-weight-complex="normal"/>
    </style:style>
    <style:style style:name="P16"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55986" style:font-name-asian="Arial2" style:font-size-asian="22pt" style:font-weight-asian="normal" style:font-name-complex="Arial2" style:font-size-complex="22pt" style:font-weight-complex="normal"/>
    </style:style>
    <style:style style:name="P17" style:family="paragraph" style:parent-style-name="normal">
      <style:paragraph-properties fo:margin-top="0.494cm" fo:margin-bottom="0.494cm" style:contextual-spacing="false" fo:line-height="100%" fo:text-align="start" style:justify-single-word="false"/>
      <style:text-properties fo:font-weight="normal" officeooo:paragraph-rsid="00179683" style:font-weight-asian="normal" style:font-weight-complex="normal"/>
    </style:style>
    <style:style style:name="P18" style:family="paragraph" style:parent-style-name="normal">
      <style:paragraph-properties fo:margin-top="0.494cm" fo:margin-bottom="0.494cm" style:contextual-spacing="false" fo:line-height="100%" fo:text-align="start" style:justify-single-word="false"/>
      <style:text-properties style:font-name="Liberation Serif" officeooo:paragraph-rsid="0013bbfd"/>
    </style:style>
    <style:style style:name="P19"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79683" style:font-name-asian="Arial2" style:font-size-asian="22pt" style:font-weight-asian="bold" style:font-name-complex="Arial2" style:font-size-complex="22pt"/>
    </style:style>
    <style:style style:name="T7" style:family="text">
      <style:text-properties style:font-name="Arial" fo:font-size="22pt" fo:font-weight="bold" officeooo:rsid="00216720" style:font-name-asian="Arial2" style:font-size-asian="22pt" style:font-weight-asian="bold" style:font-name-complex="Arial2" style:font-size-complex="22pt"/>
    </style:style>
    <style:style style:name="T8" style:family="text">
      <style:text-properties style:font-name="Arial" fo:font-size="22pt" style:font-name-asian="Arial2" style:font-size-asian="22pt" style:font-name-complex="Arial2" style:font-size-complex="22pt"/>
    </style:style>
    <style:style style:name="T9" style:family="text">
      <style:text-properties style:font-name="Arial" fo:font-size="22pt" officeooo:rsid="00125de4" style:font-name-asian="Arial2" style:font-size-asian="22pt" style:font-name-complex="Arial2" style:font-size-complex="22pt"/>
    </style:style>
    <style:style style:name="T10" style:family="text">
      <style:text-properties style:font-name="Arial" fo:font-size="22pt" officeooo:rsid="001260f3" style:font-name-asian="Arial2" style:font-size-asian="22pt" style:font-name-complex="Arial2" style:font-size-complex="22pt"/>
    </style:style>
    <style:style style:name="T11"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2" style:family="text">
      <style:text-properties style:font-name="Arial" fo:font-size="15pt" officeooo:rsid="001260f3" style:font-name-asian="Arial2" style:font-size-asian="15pt" style:font-name-complex="Arial2" style:font-size-complex="15pt"/>
    </style:style>
    <style:style style:name="T13" style:family="text">
      <style:text-properties style:font-name="Arial" fo:font-size="15pt" officeooo:rsid="001937df" style:font-name-asian="Arial2" style:font-size-asian="15pt" style:font-name-complex="Arial2" style:font-size-complex="15pt"/>
    </style:style>
    <style:style style:name="T14"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5"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6"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17" style:family="text">
      <style:text-properties style:font-name="Arial" fo:font-size="15pt" fo:font-weight="bold" officeooo:rsid="001260f3" style:font-name-asian="Arial2" style:font-size-asian="15pt" style:font-weight-asian="bold" style:font-name-complex="Arial2" style:font-size-complex="15pt" style:font-weight-complex="bold"/>
    </style:style>
    <style:style style:name="T18" style:family="text">
      <style:text-properties style:font-name="Arial" fo:font-size="15pt" fo:font-weight="bold" officeooo:rsid="00216720" style:font-name-asian="Arial2" style:font-size-asian="15pt" style:font-weight-asian="bold" style:font-name-complex="Arial2" style:font-size-complex="15pt" style:font-weight-complex="bold"/>
    </style:style>
    <style:style style:name="T19"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0" style:family="text">
      <style:text-properties style:font-name="Arial" fo:font-size="14pt" officeooo:rsid="001260f3" style:font-name-asian="Arial2" style:font-size-asian="14pt" style:font-name-complex="Arial2" style:font-size-complex="14pt"/>
    </style:style>
    <style:style style:name="T21"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2"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3" style:family="text">
      <style:text-properties fo:font-size="15pt" style:font-size-asian="15pt" style:font-size-complex="15pt"/>
    </style:style>
    <style:style style:name="T24" style:family="text">
      <style:text-properties fo:font-size="15pt" officeooo:rsid="0013bbfd" style:font-size-asian="15pt" style:font-size-complex="15pt"/>
    </style:style>
    <style:style style:name="T25" style:family="text">
      <style:text-properties fo:font-size="15pt" officeooo:rsid="00160399" style:font-size-asian="15pt" style:font-size-complex="15pt"/>
    </style:style>
    <style:style style:name="T26" style:family="text">
      <style:text-properties fo:font-size="15pt" officeooo:rsid="001a6411" style:font-size-asian="15pt" style:font-size-complex="15pt"/>
    </style:style>
    <style:style style:name="T27" style:family="text">
      <style:text-properties fo:font-size="15pt" fo:font-weight="bold" style:font-size-asian="15pt" style:font-weight-asian="bold" style:font-size-complex="15pt" style:font-weight-complex="bold"/>
    </style:style>
    <style:style style:name="T28" style:family="text">
      <style:text-properties fo:font-size="15pt" fo:font-style="italic" fo:font-weight="bold" officeooo:rsid="00160399" style:font-size-asian="15pt" style:font-style-asian="italic" style:font-weight-asian="bold" style:font-size-complex="15pt" style:font-style-complex="italic" style:font-weight-complex="bold"/>
    </style:style>
    <style:style style:name="T29"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0" style:family="text">
      <style:text-properties fo:font-size="15pt" fo:font-style="italic" fo:font-weight="bold" officeooo:rsid="001fc62a" style:font-name-asian="Arial2" style:font-size-asian="15pt" style:font-style-asian="italic" style:font-weight-asian="bold" style:font-name-complex="Arial2" style:font-size-complex="15pt" style:font-style-complex="italic" style:font-weight-complex="bold"/>
    </style:style>
    <style:style style:name="T31" style:family="text">
      <style:text-properties fo:font-size="15pt" fo:font-style="italic" fo:font-weight="bold" officeooo:rsid="00216720" style:font-name-asian="Arial2" style:font-size-asian="15pt" style:font-style-asian="italic" style:font-weight-asian="bold" style:font-name-complex="Arial2" style:font-size-complex="15pt" style:font-style-complex="italic" style:font-weight-complex="bold"/>
    </style:style>
    <style:style style:name="T32" style:family="text">
      <style:text-properties fo:font-weight="bold" officeooo:rsid="0013bbfd" style:font-weight-asian="bold" style:font-weight-complex="bold"/>
    </style:style>
    <style:style style:name="T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Arial1" fo:font-size="15pt" style:font-size-asian="15pt" style:font-size-complex="15pt"/>
    </style:style>
    <style:style style:name="T35" style:family="text">
      <style:text-properties style:font-name="Arial1" fo:font-size="15pt" officeooo:rsid="001260f3" style:font-name-asian="Arial2" style:font-size-asian="15pt" style:font-name-complex="Arial2" style:font-size-complex="15pt"/>
    </style:style>
    <style:style style:name="T36"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7"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8"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39" style:family="text">
      <style:text-properties style:font-name="Liberation Serif" fo:font-style="italic" officeooo:rsid="001260f3" style:font-name-asian="Arial2" style:font-style-asian="italic" style:font-name-complex="Arial2"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draw:frame draw:style-name="fr3" draw:name="image10.png" text:anchor-type="char" svg:x="-0.485cm" svg:y="0.203cm" svg:width="4.939cm" svg:height="1.446cm" draw:z-index="1"><draw:image xlink:href="Pictures/100000000000012C0000005AEAF22963.png" xlink:type="simple" xlink:show="embed" xlink:actuate="onLoad" draw:mime-type="image/png"/></draw:frame><draw:frame draw:style-name="fr3"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4" loext:marker-style-name="T1"><text:span text:style-name="T1"/></text:p>
      <text:p text:style-name="P4" loext:marker-style-name="T1"><text:span text:style-name="T1">Practica </text:span><text:span text:style-name="T7">7</text:span><text:span text:style-name="T2"> LCD </text:span><text:span text:style-name="T7">Scrolling</text:span></text:p>
      <text:p text:style-name="P4" loext:marker-style-name="T8"><text:span text:style-name="T1"/></text:p>
      <text:p text:style-name="P4" loext:marker-style-name="T8"><text:span text:style-name="T1">Nombre del docente:</text:span><text:span text:style-name="T8"><text:line-break/></text:span><text:span text:style-name="T9">Gustavo Moises Romero Gonzalez</text:span></text:p>
      <text:p text:style-name="P4" loext:marker-style-name="T1"><text:span text:style-name="T2">Materia:</text:span></text:p>
      <text:p text:style-name="P4" loext:marker-style-name="T1"><text:span text:style-name="T11">Sistemas Embebidos Aplicados a Móviles</text:span><text:span text:style-name="T1"><text:line-break/></text:span></text:p>
      <text:p text:style-name="P4" loext:marker-style-name="T8"><text:span text:style-name="T1">Nombre del alumno(a):</text:span></text:p>
      <text:p text:style-name="P4" loext:marker-style-name="T8"><text:span text:style-name="T8"><text:line-break/>Cabañas Santamaria Anel Athziri<text:line-break/>Miranda Martinez Alejandro<text:line-break/>Roldan Velazquez Ian Jurguen</text:span></text:p>
      <text:p text:style-name="P11" loext:marker-style-name="T8"/>
      <text:p text:style-name="P5" loext:marker-style-name="T8"><text:soft-page-break/><text:span text:style-name="T4">Objetivo</text:span></text:p>
      <text:p text:style-name="P5" loext:marker-style-name="T8"><text:span text:style-name="T12"><text:s/></text:span><text:span text:style-name="T35">Configurar y utilizar una pantalla LCD 16x2 con interfaz I2C en una Raspberry Pi para mostrar texto dinámico desplazable (scrolling) hacia la izquierda, aplicando técnicas de manipulación de cadenas de caracteres en Python bajo un enfoque modular y de alta legibilidad.</text:span><text:span text:style-name="T12"><text:line-break/></text:span><text:span text:style-name="T10"><text:line-break/><text:line-break/></text:span><text:span text:style-name="T3">Librerías Descargadas e Instalación</text:span></text:p>
      <text:p text:style-name="P7" loext:marker-style-name="T8"><text:span text:style-name="T22">Para el manejo del hardware y el control síncrono del protocolo serie, se preparó el entorno instalando las dependencias que administran el bus del microprocesador:</text:span></text:p>
      <text:p text:style-name="P7" loext:marker-style-name="T8"><text:span text:style-name="T22"><text:s text:c="4"/></text:span><text:span text:style-name="T21">smbus2</text:span><text:span text:style-name="T22">: Una envoltura pura de Python que reemplaza y mejora el módulo clásico smbus, permitiendo transacciones directas a través del bus I2C del kernel de Linux de forma eficiente.</text:span></text:p>
      <text:p text:style-name="P7" loext:marker-style-name="T8"><text:span text:style-name="T22"><text:s text:c="4"/></text:span><text:span text:style-name="T21">RPLCD</text:span><text:span text:style-name="T22">: Biblioteca principal encargada de traducir los comandos lógicos de escritura hacia las direcciones de memoria interna de la pantalla.</text:span></text:p>
      <text:p text:style-name="P10" loext:marker-style-name="T8"><text:span text:style-name="T4">Pasos de configuración</text:span><text:span text:style-name="T10"><text:line-break/><text:line-break/></text:span><text:span text:style-name="T22"># 1. Actualización de repositorios del sistema operativo: </text:span><text:span text:style-name="T21">sudo apt update</text:span></text:p>
      <text:p text:style-name="P10" loext:marker-style-name="T8"><text:span text:style-name="T22"># 2. Instalación de la herramienta de gestión de paquetes de Python :<text:line-break/></text:span><text:span text:style-name="T21">sudo apt install python3-pip -y</text:span></text:p>
      <text:p text:style-name="P10" loext:marker-style-name="T8"><text:span text:style-name="T22"># 3. Instalación de las librerías necesarias mediante pip3:</text:span></text:p>
      <text:p text:style-name="P10" loext:marker-style-name="T8"><text:soft-page-break/><text:span text:style-name="T21">pip3 install RPLCD smbus2</text:span><text:span text:style-name="T10"><text:line-break/><text:line-break/><text:line-break/>Desarrollo de la Practica</text:span></text:p>
      <text:p text:style-name="P12" loext:marker-style-name="T8">1. Creación de carpeta y archivo.</text:p>
      <text:p text:style-name="P6" loext:marker-style-name="T8"><text:span text:style-name="T13">Se creo una carpeta llamada </text:span><text:span text:style-name="T16">P</text:span><text:span text:style-name="T18">7</text:span><text:span text:style-name="T16">_lcd_</text:span><text:span text:style-name="T18">scroll</text:span><text:span text:style-name="T16"> </text:span><text:span text:style-name="T19">para poder identificarla y meter el código dentro.</text:span><text:span text:style-name="T12"><text:line-break/><text:line-break/><text:line-break/></text:span><text:span text:style-name="T14">Adjunto Programa </text:span><text:span text:style-name="T15">y nombre de archivo</text:span><text:span text:style-name="T14">:</text:span></text:p>
      <text:p text:style-name="P18" loext:marker-style-name="T8"><text:span text:style-name="T30">lcd</text:span><text:span text:style-name="T29">_</text:span><text:span text:style-name="T31">utils</text:span><text:span text:style-name="T29">.py</text:span></text:p>
      <text:p text:style-name="P8" loext:marker-style-name="T8"><text:span text:style-name="T33">from RPLCD.i2c import CharLCD</text:span></text:p>
      <text:p text:style-name="P8" loext:marker-style-name="T8"><text:span text:style-name="T33">import time</text:span></text:p>
      <text:p text:style-name="P8" loext:marker-style-name="T8"><text:span text:style-name="T33"/></text:p>
      <text:p text:style-name="P8" loext:marker-style-name="T8"><text:span text:style-name="T33">class LCDController:</text:span></text:p>
      <text:p text:style-name="P8" loext:marker-style-name="T8"><text:span text:style-name="T33"><text:s text:c="4"/>def __init__(self, address=0x27, cols=16, rows=2):</text:span></text:p>
      <text:p text:style-name="P8" loext:marker-style-name="T8"><text:span text:style-name="T33"><text:s text:c="8"/>self.lcd = CharLCD(i2c_expander='PCF8574', address=address,</text:span></text:p>
      <text:p text:style-name="P8" loext:marker-style-name="T8"><text:span text:style-name="T33"><text:s text:c="27"/>port=1, cols=cols, rows=rows, charmap='A00',</text:span></text:p>
      <text:p text:style-name="P8" loext:marker-style-name="T8"><text:span text:style-name="T33"><text:s text:c="27"/>auto_linebreaks=True)</text:span></text:p>
      <text:p text:style-name="P8" loext:marker-style-name="T8"><text:span text:style-name="T33"><text:s text:c="8"/>self.cols = cols</text:span></text:p>
      <text:p text:style-name="P8" loext:marker-style-name="T8"><text:span text:style-name="T33"><text:s text:c="8"/>self.rows = rows</text:span></text:p>
      <text:p text:style-name="P8" loext:marker-style-name="T8"><text:span text:style-name="T33"/></text:p>
      <text:p text:style-name="P8" loext:marker-style-name="T8"><text:span text:style-name="T33"><text:s text:c="4"/>def clear(self):</text:span></text:p>
      <text:p text:style-name="P8" loext:marker-style-name="T8"><text:span text:style-name="T33"><text:s text:c="8"/>self.lcd.clear()</text:span></text:p>
      <text:p text:style-name="P8" loext:marker-style-name="T8"><text:span text:style-name="T33"/></text:p>
      <text:p text:style-name="P8" loext:marker-style-name="T8"><text:soft-page-break/><text:span text:style-name="T33"><text:s text:c="4"/>def write(self, text, line=0):</text:span></text:p>
      <text:p text:style-name="P8" loext:marker-style-name="T8"><text:span text:style-name="T33"><text:s text:c="8"/>self.lcd.cursor_pos = (line, 0)</text:span></text:p>
      <text:p text:style-name="P8" loext:marker-style-name="T8"><text:span text:style-name="T33"><text:s text:c="8"/>self.lcd.write_string(text.ljust(self.cols))</text:span></text:p>
      <text:p text:style-name="P8" loext:marker-style-name="T8"><text:span text:style-name="T33"/></text:p>
      <text:p text:style-name="P8" loext:marker-style-name="T8"><text:span text:style-name="T33"><text:s text:c="4"/>def scroll_text(self, text, line=0, delay=0.3, repeat=1):</text:span></text:p>
      <text:p text:style-name="P8" loext:marker-style-name="T8"><text:span text:style-name="T33"><text:s text:c="8"/>scroll_text = text + " " * self.cols</text:span></text:p>
      <text:p text:style-name="P8" loext:marker-style-name="T8"><text:span text:style-name="T33"><text:s text:c="8"/>for _ in range(repeat):</text:span></text:p>
      <text:p text:style-name="P8" loext:marker-style-name="T8"><text:span text:style-name="T33"><text:s text:c="12"/>for i in range(len(scroll_text) - self.cols + 1):</text:span></text:p>
      <text:p text:style-name="P8" loext:marker-style-name="T8"><text:span text:style-name="T33"><text:s text:c="16"/>self.write(scroll_text[i:i+self.cols], line)</text:span></text:p>
      <text:p text:style-name="P8" loext:marker-style-name="T8"><text:span text:style-name="T33"><text:s text:c="16"/>time.sleep(delay)</text:span></text:p>
      <text:p text:style-name="P8" loext:marker-style-name="T8"><text:span text:style-name="T33"/></text:p>
      <text:p text:style-name="P8" loext:marker-style-name="T8"><text:span text:style-name="T33"><text:s text:c="4"/>def close(self):</text:span></text:p>
      <text:p text:style-name="P8" loext:marker-style-name="T8"><text:span text:style-name="T33"><text:s text:c="8"/>self.lcd.clear()</text:span></text:p>
      <text:p text:style-name="P8" loext:marker-style-name="T8"><text:span text:style-name="T33"><text:s text:c="8"/>self.lcd.close()</text:span></text:p>
      <text:p text:style-name="P9" loext:marker-style-name="T8"><text:span text:style-name="T33"><text:line-break/></text:span><text:span text:style-name="T38">main</text:span><text:span text:style-name="T37">.py</text:span></text:p>
      <text:p text:style-name="P19" loext:marker-style-name="T8"><text:span text:style-name="T39">from lcd_utils import LCDController</text:span></text:p>
      <text:p text:style-name="P19" loext:marker-style-name="T8"><text:span text:style-name="T39"/></text:p>
      <text:p text:style-name="P19" loext:marker-style-name="T8"><text:span text:style-name="T39">def main():</text:span></text:p>
      <text:p text:style-name="P19" loext:marker-style-name="T8"><text:span text:style-name="T39"><text:s text:c="4"/>lcd = LCDController()</text:span></text:p>
      <text:p text:style-name="P19" loext:marker-style-name="T8"><text:span text:style-name="T39"><text:s text:c="4"/>try:</text:span></text:p>
      <text:p text:style-name="P19" loext:marker-style-name="T8"><text:span text:style-name="T39"><text:s text:c="8"/>print("Inicializando pantalla LCD...")</text:span></text:p>
      <text:p text:style-name="P19" loext:marker-style-name="T8"><text:span text:style-name="T39"><text:s text:c="8"/>lcd.clear()</text:span></text:p>
      <text:p text:style-name="P19" loext:marker-style-name="T8"><text:span text:style-name="T39"/></text:p>
      <text:p text:style-name="P19" loext:marker-style-name="T8"><text:span text:style-name="T39"><text:s text:c="8"/>lcd.write("LCD Inicializado", line=0)</text:span></text:p>
      <text:p text:style-name="P19" loext:marker-style-name="T8"><text:span text:style-name="T39"/></text:p>
      <text:p text:style-name="P19" loext:marker-style-name="T8"><text:span text:style-name="T39"><text:s text:c="8"/>print("Iniciando efecto de desplazamiento (scrolling)...")</text:span></text:p>
      <text:p text:style-name="P19" loext:marker-style-name="T8"><text:span text:style-name="T39"/></text:p>
      <text:p text:style-name="P19" loext:marker-style-name="T8"><text:span text:style-name="T39"><text:s text:c="8"/>lcd.scroll_text("Este texto se desplaza hacia la izquierda!", line=1, delay=0.2, repeat=3)</text:span></text:p>
      <text:p text:style-name="P19" loext:marker-style-name="T8"><text:span text:style-name="T39"/></text:p>
      <text:p text:style-name="P19" loext:marker-style-name="T8"><text:span text:style-name="T39"><text:s text:c="4"/>except Exception as e:</text:span></text:p>
      <text:p text:style-name="P19" loext:marker-style-name="T8"><text:soft-page-break/><text:span text:style-name="T39"><text:s text:c="8"/>print(f"Error detectado: {e}")</text:span></text:p>
      <text:p text:style-name="P19" loext:marker-style-name="T8"><text:span text:style-name="T39"><text:s text:c="4"/>finally:</text:span></text:p>
      <text:p text:style-name="P19" loext:marker-style-name="T8"><text:span text:style-name="T39"><text:s text:c="8"/>print("Limpiando y cerrando LCD de forma segura.")</text:span></text:p>
      <text:p text:style-name="P19" loext:marker-style-name="T8"><text:span text:style-name="T39"><text:s text:c="8"/>lcd.close()</text:span></text:p>
      <text:p text:style-name="P19" loext:marker-style-name="T8"><text:span text:style-name="T39"/></text:p>
      <text:p text:style-name="P19" loext:marker-style-name="T8"><text:span text:style-name="T39">if __name__ == "__main__":</text:span></text:p>
      <text:p text:style-name="P19" loext:marker-style-name="T8"><text:span text:style-name="T39"><text:s text:c="4"/>main()</text:span></text:p>
      <text:p text:style-name="P2"><text:span text:style-name="T14"/></text:p>
      <text:p text:style-name="P2"><text:span text:style-name="T14"/></text:p>
      <text:p text:style-name="P1"/>
      <text:p text:style-name="P1"/>
      <text:p text:style-name="P1"><text:span text:style-name="T17"/></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2. </text:span><text:span text:style-name="T5">Conexión</text:span></text:p>
      <text:p text:style-name="P13" loext:marker-style-name="T8"><text:span text:style-name="T23"><text:line-break/> </text:span><text:span text:style-name="T27"><text:s/>LCD 16x2 I2C </text:span><text:span text:style-name="T23"><text:s text:c="15"/><text:tab/> <text:s/></text:span><text:span text:style-name="T27">Raspberry Pi GPIO (Pinout)</text:span></text:p>
      <text:p text:style-name="P13" loext:marker-style-name="T8"><text:span text:style-name="T24"><text:s text:c="3"/>GND <text:s text:c="8"/>◄────────► <text:tab/><text:tab/>Pin 6 <text:s/>(GND)</text:span></text:p>
      <text:p text:style-name="P13" loext:marker-style-name="T8"><text:span text:style-name="T24"><text:s text:c="4"/>VCC <text:s text:c="3"/>◄─────────► <text:tab/><text:tab/>Pin 2 <text:s/>(5V) <text:s text:c="10"/></text:span></text:p>
      <text:p text:style-name="P13" loext:marker-style-name="T8"><text:span text:style-name="T24"><text:s text:c="3"/>SDA <text:s text:c="4"/>◄─────────► <text:tab/><text:tab/>Pin 3 <text:s/>(GPIO 2 - SDA) </text:span></text:p>
      <text:p text:style-name="P13" loext:marker-style-name="T8"><text:span text:style-name="T24"><text:s text:c="4"/>SCL <text:s text:c="4"/>◄────────► <text:s text:c="2"/><text:tab/> <text:s text:c="4"/>Pin 5 <text:s/>(GPIO 3 - SCL) <text:s/><text:tab/><text:tab/> <text:s text:c="3"/><text:line-break/></text:span><draw:frame draw:style-name="fr1" draw:name="Imagen7" text:anchor-type="char" svg:x="0.159cm" svg:y="1.15cm" svg:width="16.588cm" svg:height="9.525cm" draw:z-index="2"><draw:image xlink:href="Pictures/10000000000004000000024C6A7798AC.png" xlink:type="simple" xlink:show="embed" xlink:actuate="onLoad" draw:mime-type="image/png"/></draw:frame><draw:frame draw:style-name="fr1" draw:name="Imagen1" text:anchor-type="char" svg:x="2.607cm" svg:y="9.71cm" svg:width="11.987cm" svg:height="7.736cm" draw:z-index="3"><draw:image xlink:href="Pictures/1000000100000601000003E037830C49.png" xlink:type="simple" xlink:show="embed" xlink:actuate="onLoad" draw:mime-type="image/png"/></draw:frame><text:span text:style-name="T24"><text:line-break/></text:span></text:p>
      <text:p text:style-name="P14" loext:marker-style-name="T8"><text:span text:style-name="T24"><text:line-break/><text:line-break/></text:span></text:p>
      <text:p text:style-name="P14" loext:marker-style-name="T8"><text:soft-page-break/><text:span text:style-name="T24"><text:line-break/></text:span><text:span text:style-name="T32">3. Ejecución de programa y implementarlo.</text:span></text:p>
      <text:p text:style-name="P15" loext:marker-style-name="T8"><draw:frame draw:style-name="fr1" draw:name="Imagen2" text:anchor-type="char" svg:x="0.99cm" svg:y="0.106cm" svg:width="15.61cm" svg:height="0.847cm" draw:z-index="4"><draw:image xlink:href="Pictures/100000000000024E00000020BD3B423F.png" xlink:type="simple" xlink:show="embed" xlink:actuate="onLoad" draw:mime-type="image/png"/></draw:frame><text:span text:style-name="T25"><text:line-break/> <text:line-break/></text:span><text:span text:style-name="T26">Resultado:<text:line-break/></text:span><draw:frame draw:style-name="fr2" draw:name="Imagen3" text:anchor-type="char" svg:width="15.187cm" svg:height="1.931cm" draw:z-index="5"><draw:image xlink:href="Pictures/100000000000023E000000492DC051A5.png" xlink:type="simple" xlink:show="embed" xlink:actuate="onLoad" draw:mime-type="image/png"/></draw:frame><text:span text:style-name="T25"><text:line-break/><text:line-break/><text:line-break/></text:span><draw:frame draw:style-name="fr1" draw:name="Imagen4" text:anchor-type="char" svg:x="0cm" svg:y="5.29cm" svg:width="17.59cm" svg:height="13.234cm" draw:z-index="6"><draw:image xlink:href="Pictures/1000000000000640000004B4A51E6C12.png" xlink:type="simple" xlink:show="embed" xlink:actuate="onLoad" draw:mime-type="image/png"/></draw:frame></text:p>
      <text:p text:style-name="P15" loext:marker-style-name="T8"><text:span text:style-name="T28"/></text:p>
      <text:p text:style-name="P15" loext:marker-style-name="T8"><text:soft-page-break/><text:span text:style-name="T36">Conclusión:</text:span><text:span text:style-name="T25"><text:line-break/><text:line-break/>El desarrollo de esta práctica demostró con éxito cómo resolver restricciones de hardware mediante algoritmos de software. Al implementar la técnica de ventana deslizante en el método scroll_text(), se logró proyectar cadenas de texto extensas que excedían el límite físico de 16 caracteres de la pantalla LCD, expandiendo así las capacidades de interacción visual de la interfaz.</text:span></text:p>
      <text:p text:style-name="P15" loext:marker-style-name="T8"><text:span text:style-name="T25">Por otra parte, la inclusión de retroalimentación en la terminal nativa del sistema operativo (print) combinada con el uso estricto del bloque finally para asegurar la invocación de lcd.close(), garantizó que el sistema no retuviera de manera indeterminada el control sobre las líneas lógicas de comunicación. Esto valida la importancia de diseñar aplicaciones embebidas robustas, tolerantes a fallos y con una correcta administración de sus recursos de hardware periféric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14:38:12.723398691</dc:date>
    <meta:editing-duration>PT28M23S</meta:editing-duration>
    <meta:editing-cycles>5</meta:editing-cycles>
    <meta:generator>LibreOffice/24.2.7.2$Linux_X86_64 LibreOffice_project/420$Build-2</meta:generator>
    <meta:document-statistic meta:table-count="0" meta:image-count="7" meta:object-count="0" meta:page-count="8" meta:paragraph-count="69" meta:word-count="523" meta:character-count="4146" meta:non-whitespace-character-count="3285"/>
  </office:meta>
</office:document-meta>
</file>